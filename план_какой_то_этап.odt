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Сейчас активный runtime-путь для VGIK Mai идёт не через полноценный браузерный сценарий с новой вкладкой, а через ветку в check_url/src/core/monitor.ts. Это важно: helper check_url/src/core/vgikMaiModule.ts с открытием Timepad во вкладке существует, но в monitor он закомментирован и сейчас не исполняется.</text:p>
      <text:p text:style-name="Standard"/>
      <text:p text:style-name="Standard">Что реально происходит сейчас</text:p>
      <text:p text:style-name="Standard"/>
      <text:p text:style-name="Standard">Монитор открывает или перезагружает страницу таргета обычным путём в check_url/src/core/monitor.ts.</text:p>
      <text:p text:style-name="Standard">Если URL таргета совпадает со страницей факультета ВГИК, это определяется через isVgikMaiFacultyPage, и дальше срабатывает специальная ветка в check_url/src/core/monitor.ts.</text:p>
      <text:p text:style-name="Standard">При VGIK_MAI_MODE = 2 или 3 код не кликает по DOM и не ищет элементы браузером. Он берёт уже загруженный HTML страницы и ищет в нём ссылку вида priemvgik.timepad.ru/event/{id}/ через pickBestNewTimepadEventUrl.</text:p>
      <text:p text:style-name="Standard">Поиск ссылки опирается на порог VGIK_MAI_MAX_TIMEPAD_EVENT_ID: берётся только event id строго больше этого числа, и выбирается максимальный id из найденных.</text:p>
      <text:p text:style-name="Standard">Если новая ссылка найдена, monitor отправляет уведомление Найдена новая ссылка на май в check_url/src/core/monitor.ts.</text:p>
      <text:p text:style-name="Standard">Если режим равен 3, дополнительно запускается runVgikMode3SubmitLoop, которому передаётся текущая страница Puppeteer только ради cookies.</text:p>
      <text:p text:style-name="Standard">Если новой ссылки нет, пишется статус Новых дат на май пока нет в check_url/src/core/monitor.ts.</text:p>
      <text:p text:style-name="Standard">Какая последовательность действий в браузере заложена в самом модуле</text:p>
      <text:p text:style-name="Standard">В модуле есть две разные логики.</text:p>
      <text:p text:style-name="Standard"/>
      <text:p text:style-name="Standard">Первая, реально активная: runVgikMode3SubmitLoop.</text:p>
      <text:p text:style-name="Standard">Она делает так:</text:p>
      <text:p text:style-name="Standard"/>
      <text:p text:style-name="Standard">Берёт cookies из текущей страницы браузера через buildCookieHeader.</text:p>
      <text:p text:style-name="Standard">Собирает заголовки, включая Cookie, Origin, Referer и X-Requested-With.</text:p>
      <text:p text:style-name="Standard">Каждые 20 секунд отправляет два axios POST на widget_register URL из env или дефолтов в check_url/src/core/vgikMaiModule.ts.</text:p>
      <text:p text:style-name="Standard">Тела POST полностью собираются из двух жёстко зашитых payload-ов в check_url/src/core/vgikMaiModule.ts и check_url/src/core/vgikMaiModule.ts.</text:p>
      <text:p text:style-name="Standard">Сравнивает комбинированный ответ двух запросов с предыдущим. Если ответ изменился, цикл останавливается и шлёт сообщение ответ изменился.</text:p>
      <text:p text:style-name="Standard"/>
      <text:p text:style-name="Standard">Вторая, сейчас неактивная: runVgikMaiFacultyFlow.</text:p>
      <text:p text:style-name="Standard">Она была задумана так:</text:p>
      <text:p text:style-name="Standard"/>
      <text:p text:style-name="Standard">Проверить, что в HTML есть текстовый маркер строки мая.</text:p>
      <text:p text:style-name="Standard">Найти новый Timepad URL.</text:p>
      <text:p text:style-name="Standard">Открыть этот URL в новой вкладке через snapshotTimepadInNewTab.</text:p>
      <text:p text:style-name="Standard">Подождать iframe вида tpw__.</text:p>
      <text:p text:style-name="Standard">Потенциально сохранить HTML снапшот.</text:p>
      <text:p text:style-name="Standard">Но фактически сохранение HTML там закомментировано, а сам вызов из monitor тоже закомментирован.</text:p>
      <text:p text:style-name="Standard">На что опирается код</text:p>
      <text:p text:style-name="Standard"/>
      <text:p text:style-name="Standard">На точное совпадение URL страницы факультета в check_url/src/core/vgikMaiModule.ts.</text:p>
      <text:p text:style-name="Standard">На текстовый маркер мая в check_url/src/core/vgikMaiModule.ts.</text:p>
      <text:p text:style-name="Standard">На regex для ссылок Timepad в check_url/src/core/vgikMaiModule.ts.</text:p>
      <text:p text:style-name="Standard">На env-переключатель VGIK_MAI_MODE в check_url/src/core/monitor.ts.</text:p>
      <text:p text:style-name="Standard">На env-порог VGIK_MAI_MAX_TIMEPAD_EVENT_ID в check_url/src/core/monitor.ts.</text:p>
      <text:p text:style-name="Standard">На cookies текущей Puppeteer-страницы, которые потом прокидываются в axios POST.</text:p>
      <text:p text:style-name="Standard"><text:soft-page-break/>На жёстко вшитые значения event_id, re_id, question id, referer и персональные данные в payload-ах mode 3.</text:p>
      <text:p text:style-name="Standard">На текстовые Cloudflare-маркеры в check_url/src/core/vgikMaiModule.ts и check_url/src/core/vgikMaiModule.ts, которые использует уже monitor для пауз и snapshot-ов.</text:p>
      <text:p text:style-name="Standard">Узкие места</text:p>
      <text:p text:style-name="Standard"/>
      <text:p text:style-name="Standard">Самое важное: активный путь почти не браузерный. После загрузки страницы код работает в основном по сырому HTML и двум POST-запросам. Если DOM или API Timepad изменятся, реальное поведение страницы это не компенсирует.</text:p>
      <text:p text:style-name="Standard">Ветка с открытием новой вкладки и iframe сейчас фактически мёртвая: вызов закомментирован в check_url/src/core/monitor.ts, а внутри helper сохранение снапшота тоже закомментировано в check_url/src/core/vgikMaiModule.ts.</text:p>
      <text:p text:style-name="Standard">Mode 3 очень хрупкий из-за хардкода. В payload зашиты event_id, re_id, question11179xxx, referer и персональные данные. Любое изменение формы на стороне Timepad ломает сценарий без ошибок компиляции.</text:p>
      <text:p text:style-name="Standard">Логика остановки цикла в mode 3 слишком грубая: цикл останавливается по любому изменению текста ответа, но не различает успешное окно, Cloudflare, валидационную ошибку формы, бан или редирект.</text:p>
      <text:p text:style-name="Standard">При ошибках внутри mode 3 цикл не останавливается, а продолжает тикать дальше каждые 20 секунд, что может зациклить бесполезные запросы.</text:p>
      <text:p text:style-name="Standard">buildCookieHeader берёт cookies только для домена priemvgik.timepad.ru, но успешность POST зависит не только от cookies. Если Timepad начнёт требовать дополнительные динамические токены из HTML или JS, этот подход перестанет работать.</text:p>
      <text:p text:style-name="Standard">pickBestNewTimepadEventUrl считает, что наибольший numeric id означает нужное новое событие. Это эвристика, а не гарантия. Если на странице появится лишняя ссылка с большим id, модуль выберет её.</text:p>
      <text:p text:style-name="Standard">Проверка наличия мая по строке мая может давать и пропуски, и ложные срабатывания. Это особенно заметно, если в разметке поменяется формат дат или пробелы.</text:p>
      <text:p text:style-name="Standard">Cloudflare-детекция целиком завязана на русские фразы в HTML. Любое изменение текста, локали или верстки отключит распознавание.</text:p>
      <text:p text:style-name="Standard">В mode 3 сообщения идут через onStepResult, но полезная диагностика ответа урезается до первых 1500 символов и в основном уходит в console.log, а не в структурированные логи.</text:p>
      <text:p text:style-name="Standard">План дальнейшего аудита</text:p>
      <text:p text:style-name="Standard"/>
      <text:p text:style-name="Standard">Зафиксировать, нужен ли вам действительно браузерный сценарий с новой вкладкой и iframe, или текущая модель должна остаться HTML+POST.</text:p>
      <text:p text:style-name="Standard">Если нужен стабильный mode 3, первым делом вынести payload, event_id, re_id и referer из хардкода в конфиг.</text:p>
      <text:p text:style-name="Standard">Если нужен стабильный поиск новой ссылки, заменить эвристику по max event id на более строгую привязку к нужному блоку факультетской страницы.</text:p>
      <text:p text:style-name="Standard">Если нужен надёжный дебаг, вернуть в активный runtime вызов browser-flow и включить сохранение HTML в check_url/src/core/vgikMaiModule.ts.</text:p>
      <text:p text:style-name="Standard">Сохранил рабочий план аудита в /memories/session/plan.md.</text:p>
      <text:p text:style-name="Standard"/>
      <text:p text:style-name="Standard">Если хочешь, следующим сообщением могу сделать одно из двух:</text:p>
      <text:p text:style-name="Standard"/>
      <text:p text:style-name="Standard">Разобрать mode 3 построчно: какие именно поля формы отправляются и зачем.</text:p>
      <text:p text:style-name="Standard">Предложить конкретный план упрощения и стабилизации этого модуля без переписывания всего monitor.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Коротко: ссылка вида https://priemvgik.timepad.ru/event/widget_register/{id} относится к Timepad-виджету регистрации, то есть к форме записи на конкретное событие.</text:p>
      <text:p text:style-name="Standard"/>
      <text:p text:style-name="Standard">По вашим сохранённым файлам видно два сценария:</text:p>
      <text:p text:style-name="Standard"/>
      <text:p text:style-name="Standard">Нормальный сценарий: открывается форма регистрации Timepad. В ней есть выбор билета/слота, поля анкеты участника, e-mail заказчика, дополнительные вопросы, подтверждения/чекбоксы и кнопка отправки регистрации. Это подтверждается тем, что в нормальной странице подключён event_register.min.js, а сам шаблон формы отправляет данные именно на widget_register/{id}.</text:p>
      <text:p text:style-name="Standard">Проблемный сценарий: вместо формы показывается не регистрация, а страница Cloudflare Один момент… / Выполнение проверки безопасности. Это как раз ваш merzlikin.html.</text:p>
      <text:p text:style-name="Standard">То есть по сути ответ такой: по widget_register/{id} ожидается форма записи Timepad на конкретное мероприятие, но на практике перед ней сайт может поставить Cloudflare-проверку, и тогда пользователь увидит не форму, а антибот-страницу.</text:p>
      <text:p text:style-name="Standard"/>
      <text:p text:style-name="Standard"/>
      <text:p text:style-name="Standard"/>
      <text:p text:style-name="Standard">Коротко: в нормальном Timepad-снимке кнопка «Зарегистрироваться» не просто открывает ссылку, а отправляет форму регистрации через JS.</text:p>
      <text:p text:style-name="Standard"/>
      <text:p text:style-name="Standard">Она висит на форме и вызывает обработчик, который собирает введённые поля и делает POST на адрес вида https://priemvgik.timepad.ru/event/widget_register/{id}. В вашем кейсе это как раз URL из check_url/src/core/vgikMaiModule.ts. То есть функция кнопки: отправить анкету/выбранный билет на регистрацию, а не перейти на новую страницу.</text:p>
      <text:p text:style-name="Standard"/>
      <text:p text:style-name="Standard"/>
      <text:p text:style-name="Standard">Коротко: потому что в сохранённом HTML у вас, скорее всего, сохранена страница-оболочка Timepad, а не уже дорендеренный виджет.</text:p>
      <text:p text:style-name="Standard"/>
      <text:p text:style-name="Standard">Причины две:</text:p>
      <text:p text:style-name="Standard"/>
      <text:p text:style-name="Standard">Сам виджет регистрации подгружается JavaScript-ом и вставляется отдельно, часто как iframe/динамический блок. Если снимок сделан до полной отрисовки или сохранён только основной HTML, сам виджет внутри не попадёт.</text:p>
      <text:p text:style-name="Standard">Да, ощущение про кнопку внизу нормальное: на обычной странице события ниже обычно есть кнопка регистрации, но в сохранённом снимке она могла не отрисоваться к моменту сохранения или быть внутри динамически загружаемого блока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87cm" fo:margin-right="0.8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2T22:08:44.702408434</meta:creation-date>
    <meta:editing-duration>PT18H58M59S</meta:editing-duration>
    <meta:editing-cycles>2</meta:editing-cycles>
    <meta:generator>LibreOffice/24.2.7.2$Linux_X86_64 LibreOffice_project/420$Build-2</meta:generator>
    <dc:date>2026-05-13T17:17:42.624191888</dc:date>
    <meta:document-statistic meta:table-count="0" meta:image-count="0" meta:object-count="0" meta:page-count="3" meta:paragraph-count="66" meta:word-count="999" meta:character-count="7829" meta:non-whitespace-character-count="6896"/>
  </office:meta>
</office:document-meta>
</file>