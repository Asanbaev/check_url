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ystem-ui" fo:font-size="9.75pt" fo:letter-spacing="normal" fo:font-style="normal" fo:font-weight="bold" officeooo:rsid="0016136b" officeooo:paragraph-rsid="0016136b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ystem-ui" fo:font-size="9.75pt" fo:letter-spacing="normal" fo:font-style="normal" fo:font-weight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ystem-ui" fo:font-size="9.75pt" fo:letter-spacing="normal" fo:font-style="normal" fo:font-weight="bold" officeooo:rsid="0016136b" officeooo:paragraph-rsid="0016136b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.159cm" fo:margin-bottom="0cm" style:contextual-spacing="false" fo:orphans="2" fo:widows="2" fo:text-indent="0cm" style:auto-text-indent="false"/>
      <style:text-properties fo:font-variant="normal" fo:text-transform="none" fo:color="#d4d4d4" loext:opacity="100%" style:font-name="system-ui" fo:font-size="9.75pt" fo:letter-spacing="normal" fo:font-style="normal" fo:font-weight="normal"/>
    </style:style>
    <style:style style:name="T1" style:family="text">
      <style:text-properties style:font-name="Droid Sans Mono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OST</text:p>
      <text:p text:style-name="P4"><text:tab/>https://priemvgik.timepad.ru/event/widget_register/3951176</text:p>
      <text:p text:style-name="P4">Состояние</text:p>
      <text:p text:style-name="P4">200</text:p>
      <text:p text:style-name="P4">ВерсияHTTP/2</text:p>
      <text:p text:style-name="P4">Передано4,28 кБ (размер 12,53 кБ)</text:p>
      <text:p text:style-name="P4">Referrer policystrict-origin-when-cross-origin</text:p>
      <text:p text:style-name="P4">Приоритет запросаHighest</text:p>
      <text:p text:style-name="P4">Поиск в DNSСистема</text:p>
      <text:p text:style-name="P4"/>
      <text:p text:style-name="P4"><text:s text:c="4"/><text:tab/></text:p>
      <text:p text:style-name="P4"><text:s text:c="4"/>cf-ray</text:p>
      <text:p text:style-name="P4"><text:s text:c="4"/><text:tab/>9f3d3e4edb0ca11d-AMS</text:p>
      <text:p text:style-name="P4"><text:s text:c="4"/>content-encoding</text:p>
      <text:p text:style-name="P4"><text:s text:c="4"/><text:tab/>br</text:p>
      <text:p text:style-name="P4"><text:s text:c="4"/>content-type</text:p>
      <text:p text:style-name="P4"><text:s text:c="4"/><text:tab/>text/html; charset=utf-8</text:p>
      <text:p text:style-name="P4"><text:s text:c="4"/>date</text:p>
      <text:p text:style-name="P4"><text:s text:c="4"/><text:tab/>Wed, 29 Apr 2026 09:22:38 GMT</text:p>
      <text:p text:style-name="P4"><text:s text:c="4"/>refresh</text:p>
      <text:p text:style-name="P4"><text:s text:c="4"/><text:tab/>20</text:p>
      <text:p text:style-name="P4"><text:s text:c="4"/>server</text:p>
      <text:p text:style-name="P4"><text:s text:c="4"/><text:tab/>cloudflare</text:p>
      <text:p text:style-name="P4"><text:s text:c="4"/>X-Firefox-Spdy</text:p>
      <text:p text:style-name="P4"><text:s text:c="4"/><text:tab/>h2</text:p>
      <text:p text:style-name="P4"><text:s text:c="4"/><text:tab/></text:p>
      <text:p text:style-name="P4"><text:s text:c="4"/>Accept</text:p>
      <text:p text:style-name="P4"><text:s text:c="4"/><text:tab/>*/*</text:p>
      <text:p text:style-name="P4"><text:s text:c="4"/>Accept-Encoding</text:p>
      <text:p text:style-name="P4"><text:s text:c="4"/><text:tab/>gzip, deflate, br, zstd</text:p>
      <text:p text:style-name="P4"><text:s text:c="4"/>Accept-Language</text:p>
      <text:p text:style-name="P4"><text:s text:c="4"/><text:tab/>ru-RU,ru;q=0.9,en-US;q=0.8,en;q=0.7</text:p>
      <text:p text:style-name="P4"><text:s text:c="4"/>Connection</text:p>
      <text:p text:style-name="P4"><text:s text:c="4"/><text:tab/>keep-alive</text:p>
      <text:p text:style-name="P4"><text:s text:c="4"/>Content-Length</text:p>
      <text:p text:style-name="P4"><text:s text:c="4"/><text:tab/>1398</text:p>
      <text:p text:style-name="P4"><text:s text:c="4"/>Content-Type</text:p>
      <text:p text:style-name="P4"><text:s text:c="4"/><text:tab/>application/x-www-form-urlencoded; charset=UTF-8</text:p>
      <text:p text:style-name="P4"><text:s text:c="4"/>Cookie</text:p>
      <text:p text:style-name="P4"><text:s text:c="4"/><text:tab/>_cfuvid=DnsYD2tlDkqE0iL0aMqSO5oDwdjoArnu7M4FZyTCBg8-1777393559.3922267-1.0.1.1-TYhFxXcZg6ClPQOYlzwxDF3CvE78w870J9UdcUeSB8w; cf_clearance=1HvDBo56a8bfAW0.w9GlEpm1Kbz1rxYa9z0bHOIaG3g-1777453261-1.2.1.1-H6LBTnQafTVqX8Ml6fTMeSx599dJpKImPJa2aWJ6XmR8o3nolL5aKk6zPiCNOGrTQ1x14F5X70Ak3WBA6DK1YuHrKN8Lr51PfeEjk.pqSfRae_Io.GP_Z9Uj3u.wRo5ynNf8rZBccmCSGxc3e_ROH9M9N1dU0nuxpMBCyRZWCtDzfmI6tvTZYOywwuXjZte5j3zT0XA7Lw5cDZoRRfqNMPc1IzIOFBMBOZ.8rpeKxeRFHDHEQ.AlzWMORGla3xA9sZjGzHQQmJQATEtxzAUijCNKp.KFqF5DYzMEdjgIyFc7WJuxMrAKRQQ0…eAccepted=true; enPop_sessionId=fdf3fcf2-43a9-11f1-9882-a263ceb8ae08; TPSESSID=a0ef3598--V2--047a80ee-ad3f-4c7e-9286-3b40c7c8f3ad; __cfwaitingroom=ChhuMExic1FOcEVObHcyZzNlQzVybmRnPT0S9AFBVXRZcDdxcERaYktnYm55QXB6ZXBPTVFMblNkazF5SXBDZnhMVEg5T1RNTmFKVGlhMGNjZ3Y2OForN015K0FqMWdrREhEMWY2UjNqaFplcENSYmxNb3hrRUYwN3JqWGtZS0hGZDlYdk1LdXIrRkZwbGlQUG9qM2dyY3E2bGlXakx4Z0Q0VGI2QmV2REVPek15bk11Uk4zZEZzdVp4NW9YaW9JYk43Z<text:soft-page-break/>Gp5NlpFV1Q1aHRHWDNpYmNxZktxZDIyVFBUOUhjaEVGbUt0K3AwS0haMmU0azEvTnMreUsyNnVoc3pDZmpMZU5neFlyRjVLVk5ac3c9</text:p>
      <text:p text:style-name="P4"><text:s text:c="4"/>Host</text:p>
      <text:p text:style-name="P4"><text:s text:c="4"/><text:tab/>priemvgik.timepad.ru</text:p>
      <text:p text:style-name="P4"><text:s text:c="4"/>Origin</text:p>
      <text:p text:style-name="P4"><text:s text:c="4"/><text:tab/>https://priemvgik.timepad.ru</text:p>
      <text:p text:style-name="P4"><text:s text:c="4"/>Priority</text:p>
      <text:p text:style-name="P4"><text:s text:c="4"/><text:tab/>u=0</text:p>
      <text:p text:style-name="P4"><text:s text:c="4"/>Referer</text:p>
      <text:p text:style-name="P4"><text:s text:c="4"/><text:tab/>https://priemvgik.timepad.ru/event/3951176/</text:p>
      <text:p text:style-name="P4"><text:s text:c="4"/>Sec-Fetch-Dest</text:p>
      <text:p text:style-name="P4"><text:s text:c="4"/><text:tab/>empty</text:p>
      <text:p text:style-name="P4"><text:s text:c="4"/>Sec-Fetch-Mode</text:p>
      <text:p text:style-name="P4"><text:s text:c="4"/><text:tab/>cors</text:p>
      <text:p text:style-name="P4"><text:s text:c="4"/>Sec-Fetch-Site</text:p>
      <text:p text:style-name="P4"><text:s text:c="4"/><text:tab/>same-origin</text:p>
      <text:p text:style-name="P4"><text:s text:c="4"/>TE</text:p>
      <text:p text:style-name="P4"><text:s text:c="4"/><text:tab/>trailers</text:p>
      <text:p text:style-name="P4"><text:s text:c="4"/>User-Agent</text:p>
      <text:p text:style-name="P4"><text:s text:c="4"/><text:tab/>Mozilla/5.0 (X11; Ubuntu; Linux x86_64; rv:150.0) Gecko/20100101 Firefox/150.0</text:p>
      <text:p text:style-name="P4"><text:s text:c="4"/>X-Requested-With</text:p>
      <text:p text:style-name="P4"><text:s text:c="4"/><text:tab/>XMLHttpRequest</text:p>
      <text:p text:style-name="P4"/>
      <text:p text:style-name="P4"/>
      <text:p text:style-name="P4"/>
      <text:p text:style-name="P2">Request Payload / Form Data</text:p>
      <text:p text:style-name="P2">{</text:p>
      <text:p text:style-name="P2"><text:tab/>"re_id": "8073541",</text:p>
      <text:p text:style-name="P2"><text:tab/>"user_forms[0][surname]": "Асанбаева",</text:p>
      <text:p text:style-name="P2"><text:tab/>"user_forms[0][name]": "Софья",</text:p>
      <text:p text:style-name="P2"><text:tab/>"user_forms[0][question11179814]": "Вадимовна",</text:p>
      <text:p text:style-name="P2"><text:tab/>"user_forms[0][question11179815]": "18918490730",</text:p>
      <text:p text:style-name="P2"><text:tab/>"user_forms[0][question11179816]": "8022494594",</text:p>
      <text:p text:style-name="P2"><text:tab/>"user_forms[0][question11179817]": "18 лет",</text:p>
      <text:p text:style-name="P2"><text:tab/>"user_forms[0][question11179818]": "Уфа",</text:p>
      <text:p text:style-name="P2"><text:tab/>"user_forms[0][question11179819]": "+79374745034",</text:p>
      <text:p text:style-name="P2"><text:tab/>"user_forms[0][mail]": "sofaasanbai@gmail.com",</text:p>
      <text:p text:style-name="P2"><text:tab/>"payment_method": "yookassa_sbp_v2",</text:p>
      <text:p text:style-name="P2"><text:tab/>"subscribe_digest": "on",</text:p>
      <text:p text:style-name="P2"><text:tab/>"accepted_terms": "on",</text:p>
      <text:p text:style-name="P2"><text:tab/>"tickets[0][re_id]": "8073541",</text:p>
      <text:p text:style-name="P2"><text:tab/>"locale": "ru",</text:p>
      <text:p text:style-name="P2"><text:tab/>"aux[use_ticket_remind]": "1",</text:p>
      <text:p text:style-name="P2"><text:tab/>"referer": "https://priemvgik.timepad.ru/event/3951176/?__cf_chl_tk=C.EeP6NPXUkvDfnAU9oU8VlvhC7QTXuUWTyOphA1HSg-1777453251-1.0.1.1-0oiMwsgdChfYuk8l68xscGgUN8lPCFfPSscy4ktYHp8",</text:p>
      <text:p text:style-name="P2"><text:tab/>"stat_metadata[event_id]": "3951176",</text:p>
      <text:p text:style-name="P2"><text:tab/>"stat_metadata[org_id]": "332401",</text:p>
      <text:p text:style-name="P2"><text:tab/>"stat_metadata[event_cats]": "525",</text:p>
      <text:p text:style-name="P2"><text:tab/>"stat_metadata[reg_count]": "1",</text:p>
      <text:p text:style-name="P2"><text:tab/>"stat_metadata[questions_count]": "9",</text:p>
      <text:p text:style-name="P2"><text:tab/>"stat_metadata[max_price]": "0",</text:p>
      <text:p text:style-name="P2"><text:tab/>"stat_metadata[from]": "isInTimepad",</text:p>
      <text:p text:style-name="P2"><text:soft-page-break/><text:tab/>"stat_metadata[widget_mode]": "default",</text:p>
      <text:p text:style-name="P2"><text:tab/>"stat_metadata[widget_id]": "",</text:p>
      <text:p text:style-name="P2"><text:tab/>"stat_metadata[widget_consumer_url]": "https://priemvgik.timepad.ru/event/3951176/",</text:p>
      <text:p text:style-name="P2"><text:tab/>"stat_metadata[use_multireg]": "false",</text:p>
      <text:p text:style-name="P2"><text:tab/>"stat_metadata[widget_use_multiank]": "false"</text:p>
      <text:p text:style-name="P2">}</text:p>
      <text:p text:style-name="P2"/>
      <text:p text:style-name="P2"/>
      <text:p text:style-name="P3">куки <text:line-break/><text:tab/>"ChhuMExic1FOcEVObHcyZzNlQzVybmRnPT0S9AFBVXRZcDdxcERaYktnYm55QXB6ZXBPTVFMblNkazF5SXBDZnhMVEg5T1RNTmFKVGlhMGNjZ3Y2OForN015K0FqMWdrREhEMWY2UjNqaFplcENSYmxNb3hrRUYwN3JqWGtZS0hGZDlYdk1LdXIrRkZwbGlQUG9qM2dyY3E2bGlXakx4Z0Q0VGI2QmV2REVPek15bk11Uk4zZEZzdVp4NW9YaW9JYk43ZGp5NlpFV1Q1aHRHWDNpYmNxZktxZDIyVFBUOUhjaEVGbUt0K3AwS0haMmU0azEvTnMreUsyNnVoc3pDZmpMZU5neFlyRjVLVk5ac3c9"</text:p>
      <text:p text:style-name="P3">_cfuvid<text:tab/>"DnsYD2tlDkqE0iL0aMqSO5oDwdjoArnu7M4FZyTCBg8-1777393559.3922267-1.0.1.1-TYhFxXcZg6ClPQOYlzwxDF3CvE78w870J9UdcUeSB8w"</text:p>
      <text:p text:style-name="P3">cf_clearance<text:tab/>"1HvDBo56a8bfAW0.w9GlEpm1Kbz1rxYa9z0bHOIaG3g-1777453261-1.2.1.1-H6LBTnQafTVqX8Ml6fTMeSx599dJpKImPJa2aWJ6XmR8o3nolL5aKk6zPiCNOGrTQ1x14F5X70Ak3WBA6DK1YuHrKN8Lr51PfeEjk.pqSfRae_Io.GP_Z9Uj3u.wRo5ynNf8rZBccmCSGxc3e_ROH9M9N1dU0nuxpMBCyRZWCtDzfmI6tvTZYOywwuXjZte5j3zT0XA7Lw5cDZoRRfqNMPc1IzIOFBMBOZ.8rpeKxeRFHDHEQ.AlzWMORGla3xA9sZjGzHQQmJQATEtxzAUijCNKp.KFqF5DYzMEdjgIyFc7WJuxMrAKRQQ0y2v5kXHLTB.I9Hkze8AG5u_I8P9sqw"</text:p>
      <text:p text:style-name="P3">enPop_sessionId<text:tab/>"fdf3fcf2-43a9-11f1-9882-a263ceb8ae08"</text:p>
      <text:p text:style-name="P3">gdprConsentCookieAccepted<text:tab/>"true"</text:p>
      <text:p text:style-name="P3">TPSESSID<text:tab/>"a0ef3598—V2--047a80ee-ad3f-4c7e-9286-3b40c7c8f3ad"</text:p>
      <text:p text:style-name="P3"/>
      <text:p text:style-name="P3"/>
      <text:p text:style-name="P3"/>
      <text:h text:style-name="P1" text:outline-level="2">Что контролировать в F12 дальше</text:h>
      <text:p text:style-name="P5">Когда отправляете:</text:p>
      <text:list text:style-name="L1">
        <text:list-item>
          <text:p text:style-name="P7">Следите за <text:span text:style-name="Source_20_Text"><text:span text:style-name="T1">Set-Cookie</text:span></text:span>/<text:span text:style-name="Source_20_Text"><text:span text:style-name="T1">Cookie</text:span></text:span> по <text:span text:style-name="Source_20_Text"><text:span text:style-name="T1">cf_clearance</text:span></text:span> и <text:span text:style-name="Source_20_Text"><text:span text:style-name="T1">__cfwaitingroom</text:span></text:span>.</text:p>
        </text:list-item>
        <text:list-item>
          <text:p text:style-name="P7">Как только очередь пройдена, ответ на <text:span text:style-name="Source_20_Text"><text:span text:style-name="T1">widget_register</text:span></text:span> должен смениться с “Вы в очереди” на нормальный результат регистрации/валидации.</text:p>
        </text:list-item>
        <text:list-item>
          <text:p text:style-name="P6">Если после выхода из очереди снова ошибка — тогда уже анализируем поля формы (но сейчас блокер именно очередь).</text:p>
        </text:list-item>
      </text:list>
      <text:p text:style-name="Horizontal_20_Line"/>
      <text:p text:style-name="P8">Если хотите, могу расписать практичный порядок “боевого” сабмита через браузер-сессию (без curl), чтобы отправлять сразу после открытия записи и автоматически пережидать waiting room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ГЕТ запрос <text:line-break/><text:line-break/>{</text:p>
      <text:p text:style-name="P3"><text:tab/>"Состояние": "200",</text:p>
      <text:p text:style-name="P3"><text:tab/>"Версия": "HTTP/2",</text:p>
      <text:p text:style-name="P3"><text:tab/>"Передано": "4,85 кБ (размер 14,16 кБ)",</text:p>
      <text:p text:style-name="P3"><text:tab/>"Referrer policy": "strict-origin-when-cross-origin",</text:p>
      <text:p text:style-name="P3"><text:tab/>"Приоритет запроса": "Highest",</text:p>
      <text:p text:style-name="P3"><text:tab/>"Поиск в DNS": "Система"</text:p>
      <text:p text:style-name="P3">}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9T14:25:27.584777258</meta:creation-date>
    <dc:date>2026-04-29T21:15:28.278566698</dc:date>
    <meta:editing-duration>PT1H40M56S</meta:editing-duration>
    <meta:editing-cycles>1</meta:editing-cycles>
    <meta:document-statistic meta:table-count="0" meta:image-count="0" meta:object-count="0" meta:page-count="4" meta:paragraph-count="111" meta:word-count="266" meta:character-count="5230" meta:non-whitespace-character-count="4813"/>
    <meta:generator>LibreOffice/24.2.7.2$Linux_X86_64 LibreOffice_project/420$Build-2</meta:generator>
  </office:meta>
</office:document-meta>
</file>